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7.5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CP_Comman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atégorie</text:p>
          </table:table-cell>
          <table:table-cell office:value-type="string">
            <text:p>Fonction</text:p>
          </table:table-cell>
          <table:table-cell office:value-type="string">
            <text:p>Description</text:p>
          </table:table-cell>
          <table:table-cell office:value-type="string">
            <text:p>Raccourci clavier</text:p>
          </table:table-cell>
          <table:table-cell office:value-type="string">
            <text:p>Macro</text:p>
          </table:table-cell>
          <table:table-cell office:value-type="string">
            <text:p>Page Stream Deck</text:p>
          </table:table-cell>
          <table:table-cell office:value-type="string">
            <text:p>Position</text:p>
          </table:table-cell>
          <table:table-cell office:value-type="string">
            <text:p>Couleur</text:p>
          </table:table-cell>
          <table:table-cell office:value-type="string">
            <text:p>Priorité</text:p>
          </table:table-cell>
          <table:table-cell office:value-type="string">
            <text:p>Version</text:p>
          </table:table-cell>
          <table:table-cell office:value-type="string">
            <text:p>Statut</text:p>
          </table:table-cell>
          <table:table-cell office:value-type="string">
            <text:p>Commentaires</text:p>
          </table:table-cell>
        </table:table-row>
        <table:table-row table:style-name="ro1">
          <table:table-cell office:value-type="string">
            <text:p>SCFR-CP-001</text:p>
          </table:table-cell>
          <table:table-cell office:value-type="string">
            <text:p>Cockpit</text:p>
          </table:table-cell>
          <table:table-cell office:value-type="string">
            <text:p>Prêt au vol</text:p>
          </table:table-cell>
          <table:table-cell office:value-type="string">
            <text:p>Prépare le vaisseau au décollage</text:p>
          </table:table-cell>
          <table:table-cell/>
          <table:table-cell office:value-type="string">
            <text:p>Non</text:p>
          </table:table-cell>
          <table:table-cell office:value-type="string">
            <text:p>Cockpit</text:p>
          </table:table-cell>
          <table:table-cell office:value-type="string">
            <text:p>A1</text:p>
          </table:table-cell>
          <table:table-cell office:value-type="string">
            <text:p>Jaune</text:p>
          </table:table-cell>
          <table:table-cell office:value-type="string">
            <text:p>Critique</text:p>
          </table:table-cell>
          <table:table-cell office:value-type="string">
            <text:p>0.1.0</text:p>
          </table:table-cell>
          <table:table-cell office:value-type="string">
            <text:p>À créer</text:p>
          </table:table-cell>
          <table:table-cell/>
        </table:table-row>
        <table:table-row table:style-name="ro1">
          <table:table-cell office:value-type="string">
            <text:p>SCFR-CP-002</text:p>
          </table:table-cell>
          <table:table-cell office:value-type="string">
            <text:p>Cockpit</text:p>
          </table:table-cell>
          <table:table-cell office:value-type="string">
            <text:p>Énergie</text:p>
          </table:table-cell>
          <table:table-cell office:value-type="string">
            <text:p>Gestion de l'alimentation</text:p>
          </table:table-cell>
          <table:table-cell/>
          <table:table-cell office:value-type="string">
            <text:p>Non</text:p>
          </table:table-cell>
          <table:table-cell office:value-type="string">
            <text:p>Cockpit</text:p>
          </table:table-cell>
          <table:table-cell office:value-type="string">
            <text:p>A2</text:p>
          </table:table-cell>
          <table:table-cell office:value-type="string">
            <text:p>Jaune</text:p>
          </table:table-cell>
          <table:table-cell office:value-type="string">
            <text:p>Critique</text:p>
          </table:table-cell>
          <table:table-cell office:value-type="string">
            <text:p>0.1.0</text:p>
          </table:table-cell>
          <table:table-cell office:value-type="string">
            <text:p>À créer</text:p>
          </table:table-cell>
          <table:table-cell/>
        </table:table-row>
        <table:table-row table:style-name="ro1">
          <table:table-cell office:value-type="string">
            <text:p>SCFR-CP-003</text:p>
          </table:table-cell>
          <table:table-cell office:value-type="string">
            <text:p>Cockpit</text:p>
          </table:table-cell>
          <table:table-cell office:value-type="string">
            <text:p>Moteurs</text:p>
          </table:table-cell>
          <table:table-cell office:value-type="string">
            <text:p>Activation des moteurs</text:p>
          </table:table-cell>
          <table:table-cell/>
          <table:table-cell office:value-type="string">
            <text:p>Non</text:p>
          </table:table-cell>
          <table:table-cell office:value-type="string">
            <text:p>Cockpit</text:p>
          </table:table-cell>
          <table:table-cell office:value-type="string">
            <text:p>A3</text:p>
          </table:table-cell>
          <table:table-cell office:value-type="string">
            <text:p>Jaune</text:p>
          </table:table-cell>
          <table:table-cell office:value-type="string">
            <text:p>Critique</text:p>
          </table:table-cell>
          <table:table-cell office:value-type="string">
            <text:p>0.1.0</text:p>
          </table:table-cell>
          <table:table-cell office:value-type="string">
            <text:p>À créer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11">11/07/2026</text:date>, <text:time>22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7-11T22:07:20.78</dc:date>
    <dc:creator>jean michel </dc:creator>
    <meta:editing-duration>PT54S</meta:editing-duration>
    <meta:editing-cycles>1</meta:editing-cycles>
    <meta:document-statistic meta:table-count="1" meta:cell-count="46" meta:object-count="0"/>
  </office:meta>
</office:document-meta>
</file>